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nts/font9.ttf" manifest:media-type="application/x-font-ttf"/>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vg:font-face-src>
        <svg:font-face-uri xlink:href="Fonts/font1.ttf" xlink:type="simple">
          <svg:font-face-format svg:string="truetype"/>
        </svg:font-face-uri>
      </svg:font-face-src>
    </style:font-face>
    <style:font-face style:name="Arial" svg:font-family="Arial" style:font-family-generic="roman" style:font-pitch="variable"/>
    <style:font-face style:name="Comfortaa" svg:font-family="Comfortaa" style:font-family-generic="roman" style:font-pitch="variable"/>
    <style:font-face style:name="Comfortaa SemiBold" svg:font-family="'Comfortaa SemiBold'" style:font-family-generic="roman" style:font-pitch="variable"/>
    <style:font-face style:name="Impact" svg:font-family="Impact" style:font-family-generic="roman" style:font-pitch="variable"/>
    <style:font-face style:name="Liberation Sans" svg:font-family="'Liberation Sans'" style:font-family-generic="swiss" style:font-pitch="variable">
      <svg:font-face-src>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src>
    </style:font-face>
    <style:font-face style:name="Arial1" svg:font-family="Arial" style:font-family-generic="system" style:font-pitch="variable"/>
    <style:font-face style:name="Comfortaa1" svg:font-family="Comfortaa" style:font-family-generic="system" style:font-pitch="variable"/>
    <style:font-face style:name="Comfortaa SemiBold1" svg:font-family="'Comfortaa SemiBold'" style:font-family-generic="system" style:font-pitch="variable"/>
    <style:font-face style:name="Impact1" svg:font-family="Impact" style:font-family-generic="system" style:font-pitch="variable"/>
    <style:font-face style:name="Linux Libertine G" svg:font-family="'Linux Libertine G'" style:font-family-generic="system" style:font-pitch="variable">
      <svg:font-face-src>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uri xlink:href="Fonts/font9.ttf" xlink:type="simple">
          <svg:font-face-format svg:string="truetype"/>
        </svg:font-face-uri>
      </svg:font-face-src>
    </style:font-face>
  </office:font-face-decls>
  <office:automatic-styles>
    <style:style style:name="P1" style:family="paragraph" style:parent-style-name="Standard">
      <style:text-properties fo:color="#ff0000" style:font-name="Comfortaa SemiBold" fo:font-size="18pt" style:font-name-asian="Comfortaa SemiBold1" style:font-size-asian="18pt" style:font-name-complex="Comfortaa SemiBold1" style:font-size-complex="18pt"/>
    </style:style>
    <style:style style:name="P2" style:family="paragraph" style:parent-style-name="Standard">
      <style:text-properties fo:color="#ff0000" style:font-name="Impact" fo:font-size="15pt" style:font-name-asian="Impact1" style:font-size-asian="15pt" style:font-name-complex="Impact1" style:font-size-complex="15pt" fo:background-color="#ffff00"/>
    </style:style>
    <style:style style:name="P3" style:family="paragraph" style:parent-style-name="Standard">
      <style:text-properties fo:color="#ff0000" style:font-name="Comfortaa" fo:font-size="13pt" style:font-name-asian="Comfortaa1" style:font-size-asian="13pt" style:font-name-complex="Comfortaa1" style:font-size-complex="13pt"/>
    </style:style>
    <style:style style:name="P4" style:family="paragraph" style:parent-style-name="Standard">
      <style:text-properties fo:font-size="12pt" style:font-size-asian="12pt" style:font-size-complex="12pt"/>
    </style:style>
    <style:style style:name="P5" style:family="paragraph" style:parent-style-name="Standard">
      <style:text-properties fo:font-size="12pt" style:font-size-asian="12pt" style:font-size-complex="12pt" fo:background-color="#ffff00"/>
    </style:style>
    <style:style style:name="P6" style:family="paragraph" style:parent-style-name="Standard">
      <style:text-properties fo:font-size="12pt" fo:font-weight="bold" style:font-size-asian="12pt" style:font-weight-asian="bold" style:font-size-complex="12pt" style:font-weight-complex="bold"/>
    </style:style>
    <style:style style:name="P7" style:family="paragraph" style:parent-style-name="Standard">
      <style:text-properties fo:font-size="14pt" style:font-size-asian="14pt" style:font-size-complex="14pt"/>
    </style:style>
    <style:style style:name="P8" style:family="paragraph" style:parent-style-name="Standard">
      <style:text-properties style:font-name="Comfortaa" fo:font-size="12pt" style:font-name-asian="Comfortaa1" style:font-size-asian="12pt" style:font-name-complex="Comfortaa1" style:font-size-complex="12pt"/>
    </style:style>
    <style:style style:name="P9" style:family="paragraph" style:parent-style-name="Standard">
      <style:paragraph-properties fo:margin-left="0in" fo:margin-right="0in" fo:text-indent="0in" style:auto-text-indent="false"/>
    </style:style>
    <style:style style:name="P10" style:family="paragraph" style:parent-style-name="Standard">
      <style:paragraph-properties fo:margin-left="0in" fo:margin-right="0in" fo:text-indent="0in" style:auto-text-indent="false"/>
      <style:text-properties fo:font-size="12pt" style:font-size-asian="12pt" style:font-size-complex="12pt"/>
    </style:style>
    <style:style style:name="P11" style:family="paragraph" style:parent-style-name="Standard">
      <style:paragraph-properties fo:margin-left="0in" fo:margin-right="0in" fo:text-indent="0in" style:auto-text-indent="false"/>
      <style:text-properties fo:color="#ff0000" style:font-name="Comfortaa" fo:font-size="13pt" style:font-name-asian="Comfortaa1" style:font-size-asian="13pt" style:font-name-complex="Comfortaa1" style:font-size-complex="13pt"/>
    </style:style>
    <style:style style:name="P12" style:family="paragraph" style:parent-style-name="Standard">
      <style:paragraph-properties fo:margin-left="0in" fo:margin-right="0in" fo:text-indent="0.5in" style:auto-text-indent="false"/>
    </style:style>
    <style:style style:name="P13" style:family="paragraph" style:parent-style-name="Standard" style:list-style-name="WWNum8">
      <style:paragraph-properties fo:margin-left="0.5in" fo:margin-right="0in" fo:text-indent="-0.25in" style:auto-text-indent="false"/>
    </style:style>
    <style:style style:name="P14" style:family="paragraph" style:parent-style-name="Standard" style:list-style-name="WWNum1">
      <style:paragraph-properties fo:margin-left="0.5in" fo:margin-right="0in" fo:text-indent="-0.25in" style:auto-text-indent="false"/>
    </style:style>
    <style:style style:name="P15" style:family="paragraph" style:parent-style-name="Standard" style:list-style-name="WWNum3">
      <style:paragraph-properties fo:margin-left="0.5in" fo:margin-right="0in" fo:text-indent="-0.25in" style:auto-text-indent="false"/>
    </style:style>
    <style:style style:name="P16" style:family="paragraph" style:parent-style-name="Standard" style:list-style-name="WWNum7">
      <style:paragraph-properties fo:margin-left="0.5in" fo:margin-right="0in" fo:text-indent="-0.25in" style:auto-text-indent="false"/>
    </style:style>
    <style:style style:name="P17" style:family="paragraph" style:parent-style-name="Standard" style:list-style-name="WWNum9">
      <style:paragraph-properties fo:margin-left="0.5in" fo:margin-right="0in" fo:text-indent="-0.25in" style:auto-text-indent="false"/>
    </style:style>
    <style:style style:name="P18" style:family="paragraph" style:parent-style-name="Standard" style:list-style-name="WWNum2">
      <style:paragraph-properties fo:margin-left="0.5in" fo:margin-right="0in" fo:text-indent="-0.25in" style:auto-text-indent="false"/>
    </style:style>
    <style:style style:name="P19" style:family="paragraph" style:parent-style-name="Standard" style:list-style-name="WWNum6">
      <style:paragraph-properties fo:margin-left="0.5in" fo:margin-right="0in" fo:text-indent="-0.25in" style:auto-text-indent="false"/>
    </style:style>
    <style:style style:name="P20" style:family="paragraph" style:parent-style-name="Standard" style:list-style-name="WWNum12">
      <style:paragraph-properties fo:margin-left="0.5in" fo:margin-right="0in" fo:text-indent="-0.25in" style:auto-text-indent="false"/>
    </style:style>
    <style:style style:name="P21" style:family="paragraph" style:parent-style-name="Standard" style:list-style-name="WWNum4">
      <style:paragraph-properties fo:margin-left="0.5in" fo:margin-right="0in" fo:text-indent="-0.25in" style:auto-text-indent="false"/>
    </style:style>
    <style:style style:name="P22" style:family="paragraph" style:parent-style-name="Standard" style:list-style-name="WWNum5">
      <style:paragraph-properties fo:margin-left="0.5in" fo:margin-right="0in" fo:text-indent="-0.25in" style:auto-text-indent="false"/>
    </style:style>
    <style:style style:name="P23" style:family="paragraph" style:parent-style-name="Standard" style:list-style-name="WWNum11">
      <style:paragraph-properties fo:margin-left="0.5in" fo:margin-right="0in" fo:margin-top="0.1665in" fo:margin-bottom="0in" loext:contextual-spacing="false" fo:line-height="100%" fo:text-indent="-0.25in" style:auto-text-indent="false"/>
    </style:style>
    <style:style style:name="P24" style:family="paragraph" style:parent-style-name="Standard" style:list-style-name="WWNum11">
      <style:paragraph-properties fo:margin-left="0.5in" fo:margin-right="0in" fo:margin-top="0in" fo:margin-bottom="0in" loext:contextual-spacing="false" fo:line-height="100%" fo:text-indent="-0.25in" style:auto-text-indent="false"/>
    </style:style>
    <style:style style:name="P25" style:family="paragraph" style:parent-style-name="Standard" style:list-style-name="WWNum11">
      <style:paragraph-properties fo:margin-left="0.5in" fo:margin-right="0in" fo:margin-top="0in" fo:margin-bottom="0.1665in" loext:contextual-spacing="false" fo:line-height="100%" fo:text-indent="-0.25in" style:auto-text-indent="false"/>
    </style:style>
    <style:style style:name="P26" style:family="paragraph" style:parent-style-name="Standard">
      <style:paragraph-properties fo:margin-top="0in" fo:margin-bottom="0in" loext:contextual-spacing="false" fo:line-height="128%"/>
    </style:style>
    <style:style style:name="P27" style:family="paragraph" style:parent-style-name="Standard">
      <style:paragraph-properties fo:margin-top="0in" fo:margin-bottom="0in" loext:contextual-spacing="false" fo:line-height="128%"/>
      <style:text-properties fo:font-size="12pt" style:font-size-asian="12pt" style:font-size-complex="12pt"/>
    </style:style>
    <style:style style:name="P28" style:family="paragraph" style:parent-style-name="Standard">
      <style:paragraph-properties fo:margin-left="0.5in" fo:margin-right="0in" fo:text-indent="0in" style:auto-text-indent="false"/>
    </style:style>
    <style:style style:name="P29" style:family="paragraph" style:parent-style-name="Standard">
      <style:paragraph-properties fo:margin-left="0.5in" fo:margin-right="0in" fo:text-indent="0in" style:auto-text-indent="false"/>
      <style:text-properties fo:font-size="12pt" style:font-size-asian="12pt" style:font-size-complex="12pt"/>
    </style:style>
    <style:style style:name="P30" style:family="paragraph" style:parent-style-name="Standard" style:list-style-name="WWNum10">
      <style:paragraph-properties fo:margin-left="1in" fo:margin-right="0in" fo:text-indent="-0.25in" style:auto-text-indent="false"/>
    </style:style>
    <style:style style:name="P31" style:family="paragraph" style:parent-style-name="Standard" style:master-page-name="Standard">
      <style:paragraph-properties style:page-number="1"/>
    </style:style>
    <style:style style:name="T1" style:family="text">
      <style:text-properties fo:color="#ff0000" style:font-name="Comfortaa SemiBold" fo:font-size="18pt" style:font-name-asian="Comfortaa SemiBold1" style:font-size-asian="18pt" style:font-name-complex="Comfortaa SemiBold1" style:font-size-complex="18pt"/>
    </style:style>
    <style:style style:name="T2" style:family="text">
      <style:text-properties fo:color="#ff0000" style:font-name="Impact" fo:font-size="17pt" style:font-name-asian="Impact1" style:font-size-asian="17pt" style:font-name-complex="Impact1" style:font-size-complex="17pt"/>
    </style:style>
    <style:style style:name="T3" style:family="text">
      <style:text-properties fo:color="#ff0000" style:font-name="Comfortaa" fo:font-size="13pt" style:font-name-asian="Comfortaa1" style:font-size-asian="13pt" style:font-name-complex="Comfortaa1" style:font-size-complex="13pt"/>
    </style:style>
    <style:style style:name="T4" style:family="text">
      <style:text-properties fo:font-size="12pt" style:font-size-asian="12pt" style:font-size-complex="12pt"/>
    </style:style>
    <style:style style:name="T5" style:family="text">
      <style:text-properties fo:font-size="12pt" style:font-size-asian="12pt" style:font-size-complex="12pt" fo:background-color="#ffff00"/>
    </style:style>
    <style:style style:name="T6" style:family="text">
      <style:text-properties fo:font-size="12pt" style:font-size-asian="12pt" style:font-size-complex="12pt" fo:background-color="#ff0000"/>
    </style:style>
    <style:style style:name="T7" style:family="text">
      <style:text-properties fo:font-size="12pt" style:text-underline-style="none" style:font-size-asian="12pt" style:font-size-complex="12pt"/>
    </style:style>
    <style:style style:name="T8" style:family="text">
      <style:text-properties fo:font-size="12pt" fo:background-color="#ff9900" loext:char-shading-value="0" style:font-size-asian="12pt" style:font-size-complex="12pt"/>
    </style:style>
    <style:style style:name="T9" style:family="text">
      <style:text-properties fo:font-size="12pt" fo:font-weight="bold" style:font-size-asian="12pt" style:font-weight-asian="bold" style:font-size-complex="12pt" style:font-weight-complex="bold"/>
    </style:style>
    <style:style style:name="T10" style:family="text">
      <style:text-properties fo:color="#ff9900" fo:font-size="12pt" style:font-size-asian="12pt" style:font-size-complex="12pt"/>
    </style:style>
    <style:style style:name="T11" style:family="text">
      <style:text-properties fo:color="#1155cc" fo:font-size="12pt" style:text-underline-style="solid" style:text-underline-width="auto" style:text-underline-color="font-color" style:font-size-asian="12pt" style:font-size-complex="12pt"/>
    </style:style>
    <style:style style:name="T12" style:family="text">
      <style:text-properties fo:font-size="13pt" style:font-size-asian="13pt" style:font-size-complex="13pt"/>
    </style:style>
    <style:style style:name="T13" style:family="text">
      <style:text-properties style:font-name="Comfortaa" fo:font-size="15pt" style:font-name-asian="Comfortaa1" style:font-size-asian="15pt" style:font-name-complex="Comfortaa1" style:font-size-complex="15pt" fo:background-color="#ffff00"/>
    </style:style>
    <style:style style:name="T14" style:family="text">
      <style:text-properties style:font-name="Comfortaa" fo:font-size="13pt" style:font-name-asian="Comfortaa1" style:font-size-asian="13pt" style:font-name-complex="Comfortaa1" style:font-size-complex="13pt"/>
    </style:style>
    <style:style style:name="T15" style:family="text">
      <style:text-properties style:font-name="Comfortaa" fo:font-size="13pt" style:font-name-asian="Comfortaa1" style:font-size-asian="13pt" style:font-name-complex="Comfortaa1" style:font-size-complex="13pt" fo:background-color="#ffff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span text:style-name="T1">How to grow a steam game?</text:span></text:p>
      <text:p text:style-name="P1"/>
      <text:p text:style-name="Standard"><text:span text:style-name="T4">Game marketing è la disciplina di comunicazione e di consegna del tuo gioco ai giocatori</text:span></text:p>
      <text:p text:style-name="P4"/>
      <text:p text:style-name="Standard"><text:span text:style-name="T4">Nel 2026 se non si ha un publisher come epic games la cosa più probabile è quella di lanciare il tuo gioco su steam.</text:span></text:p>
      <text:p text:style-name="P4"/>
      <text:p text:style-name="Standard"><text:span text:style-name="T4">“Valve accounts?” detiene circa il 75% delle vendite totali di videogiochi per pc e all’inizio di questo anno ha raggiunto oltre 42 milioni di utenti simultanei.</text:span></text:p>
      <text:p text:style-name="P4"/>
      <text:p text:style-name="Standard"><text:span text:style-name="T4">Questo vuol dire che steam è il tuo primo canale di pubblicazione,se non ottimizzi Steam verrai lasciato indietro poiché steam è un winner-takes-all system,</text:span></text:p>
      <text:p text:style-name="P4"/>
      <text:p text:style-name="Standard"><text:span text:style-name="T4">Il percorso per pubblicizzare il tuo gioco su steam è suddiviso in 3 obiettivi:</text:span></text:p>
      <text:p text:style-name="P4"/>
      <text:p text:style-name="Standard"><text:span text:style-name="T4">1.Foundation</text:span></text:p>
      <text:p text:style-name="Standard"><text:span text:style-name="T4">2.Growth</text:span></text:p>
      <text:p text:style-name="Standard"><text:span text:style-name="T4">3.Launch</text:span></text:p>
      <text:p text:style-name="P4"/>
      <text:p text:style-name="Standard"><text:span text:style-name="T2">1-Foundation</text:span></text:p>
      <text:p text:style-name="P2"/>
      <text:p text:style-name="Standard"><text:span text:style-name="T5">Il marketing è un modo per aumentare il successo del tuo gioco,non un rimpiazzo.</text:span></text:p>
      <text:p text:style-name="Standard"><text:span text:style-name="T5">Questo vuol dire che c’è bisogno di costruire qualcosa che i giocatori vogliano.</text:span></text:p>
      <text:p text:style-name="P4"><text:soft-page-break/></text:p>
      <text:p text:style-name="Standard">Tieni a mente due cose:</text:p>
      <text:p text:style-name="Standard">1.scegli un obiettivo con abbastanza richiesta</text:p>
      <text:p text:style-name="Standard">2.fai un gioco divertente</text:p>
      <text:p text:style-name="Standard"/>
      <text:p text:style-name="Standard"><text:span text:style-name="T3">1-Target market demand</text:span></text:p>
      <text:p text:style-name="P3"/>
      <text:p text:style-name="Standard"><text:span text:style-name="T10">1-Total addressable market</text:span></text:p>
      <text:p text:style-name="Standard"><text:span text:style-name="T4"><text:tab/></text:span></text:p>
      <text:p text:style-name="Standard"><text:span text:style-name="T4">a.TAM sono il numero maggiore di copie che il tuo gioco può vendere</text:span></text:p>
      <text:p text:style-name="Standard"><text:span text:style-name="T4"><text:tab/></text:span></text:p>
      <text:p text:style-name="Standard"><text:span text:style-name="T4">b.Per stimarlo vai su </text:span><text:a xlink:type="simple" xlink:href="https://games-stats.com/steam/tags/" text:style-name="ListLabel_20_109" text:visited-style-name="ListLabel_20_109"><text:span text:style-name="T11">Game Stats</text:span></text:a><text:span text:style-name="T4"> e trova i guadagni stimati per ogni genere.</text:span></text:p>
      <text:p text:style-name="P9"><text:span text:style-name="T4"><text:tab/></text:span></text:p>
      <text:p text:style-name="P9"><text:span text:style-name="T4">c.Anche se fai un gioco fantastico,se il tuo genere l’anno prima ha fatto solo 5 <text:s text:c="4"/>vendite probabilmente non ci sono abbastanza vendite.</text:span></text:p>
      <text:p text:style-name="P12"><text:span text:style-name="T4"><text:tab/></text:span></text:p>
      <text:p text:style-name="P10"/>
      <text:p text:style-name="P10"/>
      <text:p text:style-name="P10"/>
      <text:p text:style-name="P10"/>
      <text:p text:style-name="P10"/>
      <text:p text:style-name="P9"><text:span text:style-name="T10">2-Competition intensity</text:span></text:p>
      <text:p text:style-name="P10"><text:soft-page-break/></text:p>
      <text:p text:style-name="P9"><text:span text:style-name="T4">a.usando la stessa pagina,guarda al conteggio dei giochi per capire quanti altri c’è ne sono</text:span></text:p>
      <text:p text:style-name="P9"><text:span text:style-name="T4">poi guarda a:</text:span></text:p>
      <text:p text:style-name="P9"><text:span text:style-name="T4">i.Ricavo mediano</text:span></text:p>
      <text:p text:style-name="P9"><text:span text:style-name="T4">ii.Ricavo medio</text:span></text:p>
      <text:p text:style-name="P9"><text:span text:style-name="T4">iii.Ricavo percentuale</text:span></text:p>
      <text:p text:style-name="P10"/>
      <text:p text:style-name="P9"><text:span text:style-name="T10">3-Comp title performance</text:span></text:p>
      <text:p text:style-name="P9"><text:span text:style-name="T4">a.vai su </text:span><text:a xlink:type="simple" xlink:href="https://steamdb.info/charts/" text:style-name="ListLabel_20_109" text:visited-style-name="ListLabel_20_109"><text:span text:style-name="T11">Steam DB</text:span></text:a><text:span text:style-name="T4"> e cerca i 5-10 giochi che hanno i titoli più competitivi:</text:span></text:p>
      <text:p text:style-name="P9"><text:span text:style-name="T4">i. se il gioco è già stato lanciato guarda ai giocatori stimati.</text:span></text:p>
      <text:p text:style-name="P10"/>
      <text:p text:style-name="P9"><text:span text:style-name="T4">ii. se il gioco è in pre lancio,guarda al totale dei seguiti</text:span></text:p>
      <text:p text:style-name="P10"/>
      <text:p text:style-name="P9"><text:span text:style-name="T3">Game design</text:span></text:p>
      <text:p text:style-name="P11"/>
      <text:p text:style-name="P9"><text:span text:style-name="T4">Dopo che hai scelto il genere devi decidere sui loop e novità del tuo gioco.</text:span></text:p>
      <text:p text:style-name="P10"/>
      <text:p text:style-name="P9"><text:span text:style-name="T4">Target player=il tipo di persona a cui piace e pagherebbe per il tuo gioco.</text:span></text:p>
      <text:p text:style-name="P10"/>
      <text:p text:style-name="P9"><text:span text:style-name="T4">Assumiamo che il tuo target player condivide gli stessi tratti di persone a cui sono piaciuti i tuoi giochi:</text:span></text:p>
      <text:list xml:id="list1765463917" text:style-name="WWNum8">
        <text:list-item>
          <text:p text:style-name="P13"><text:span text:style-name="T4">Genere</text:span></text:p>
        </text:list-item>
        <text:list-item>
          <text:p text:style-name="P13"><text:soft-page-break/><text:span text:style-name="T4">Titoli competitivi</text:span></text:p>
        </text:list-item>
      </text:list>
      <text:p text:style-name="P10"/>
      <text:p text:style-name="P9"><text:span text:style-name="T4">Game design è un argomento a parte,però un approccio semplice è quello di guardare a giochi di successo o ad alcune caratteristiche:</text:span></text:p>
      <text:list xml:id="list275614011" text:style-name="WWNum11">
        <text:list-item>
          <text:p text:style-name="P23"><text:span text:style-name="T4">Aesthetics</text:span></text:p>
        </text:list-item>
        <text:list-item>
          <text:p text:style-name="P24"><text:span text:style-name="T4">High level concept</text:span></text:p>
        </text:list-item>
        <text:list-item>
          <text:p text:style-name="P24"><text:span text:style-name="T4">Co-op experiences</text:span></text:p>
        </text:list-item>
        <text:list-item>
          <text:p text:style-name="P24"><text:span text:style-name="T4">Depth of content</text:span></text:p>
        </text:list-item>
        <text:list-item>
          <text:p text:style-name="P25"><text:span text:style-name="T4">Specific genre-related emotions</text:span></text:p>
        </text:list-item>
      </text:list>
      <text:p text:style-name="P10"/>
      <text:p text:style-name="P3"/>
      <text:p text:style-name="P3"/>
      <text:p text:style-name="P3"/>
      <text:p text:style-name="P3"/>
      <text:p text:style-name="P3"/>
      <text:p text:style-name="P3"/>
      <text:p text:style-name="P3"/>
      <text:p text:style-name="P3"/>
      <text:p text:style-name="Standard"><text:span text:style-name="T3">1.2-Coming soon page</text:span></text:p>
      <text:p text:style-name="Standard"><text:span text:style-name="T4">Appena tu hai le basi del tuo gioco,e il tuo genere,il mio consiglio è quello di lanciare la Coming soon page.</text:span></text:p>
      <text:p text:style-name="P4"/>
      <text:p text:style-name="Standard"><text:span text:style-name="T8">Caratteristiche minime</text:span></text:p>
      <text:p text:style-name="Standard"><text:soft-page-break/><text:span text:style-name="T8">L’elemento minimo necessario per lanciare questa pagina “Prossimamente” su steam.</text:span></text:p>
      <text:p text:style-name="Standard"><text:span text:style-name="T8">Questo include:</text:span></text:p>
      <text:p text:style-name="P4"/>
      <text:p text:style-name="Standard"><text:span text:style-name="T8">1.Game Title</text:span></text:p>
      <text:p text:style-name="Standard"><text:span text:style-name="T8">2.Genres Tag</text:span></text:p>
      <text:p text:style-name="Standard"><text:span text:style-name="T8">3.Capsule art</text:span></text:p>
      <text:p text:style-name="Standard"><text:span text:style-name="T8">4.Trailer</text:span></text:p>
      <text:p text:style-name="Standard"><text:span text:style-name="T8">5.Screenshots</text:span></text:p>
      <text:p text:style-name="Standard"><text:span text:style-name="T8">6.Description</text:span></text:p>
      <text:p text:style-name="P4"/>
      <text:p text:style-name="Standard"><text:span text:style-name="T5">a.Somiglianza </text:span></text:p>
      <text:p text:style-name="Standard"><text:span text:style-name="T4">Comunicare il tuo tipo di gioco è quello che piace alla tua target audience </text:span></text:p>
      <text:p text:style-name="P4"/>
      <text:p text:style-name="Standard"><text:span text:style-name="T5">b.Differenza</text:span></text:p>
      <text:p text:style-name="Standard"><text:span text:style-name="T4">Comunicare che è abbastanza unico dai giochi che hanno giocato in precedenza</text:span></text:p>
      <text:p text:style-name="P4"/>
      <text:p text:style-name="Standard"><text:span text:style-name="T5">c.Qualità</text:span></text:p>
      <text:p text:style-name="Standard"><text:span text:style-name="T4">Qualunque siano le caratteristiche che hai identificato come importanti per il tuo pubblico di riferimento,i contenuti devono comunicare un senso di alta qualità.</text:span></text:p>
      <text:p text:style-name="P4"/>
      <text:p text:style-name="P4"/>
      <text:p text:style-name="Standard"><text:span text:style-name="T3">1.3-Set up tracking</text:span></text:p>
      <text:p text:style-name="Standard"><text:soft-page-break/><text:span text:style-name="T12">Attribution for steam </text:span></text:p>
      <text:p text:style-name="Standard"><text:span text:style-name="T4">Attributi:È il metodo utilizzato dagli inserzionisti per determinare quali attività di marketing (ad esempio, annunci, campagne di streaming, demo) sono responsabili di quali azioni degli utenti (ad esempio, coinvolgimento, liste dei desideri, acquisti).</text:span></text:p>
      <text:p text:style-name="P4"/>
      <text:p text:style-name="Standard"><text:span text:style-name="T4">In parole semplici, risponde alla domanda: quali canali stanno creando una domanda reale e quali stanno solo generando rumore?</text:span></text:p>
      <text:p text:style-name="P4"/>
      <text:p text:style-name="P26"><text:span text:style-name="T4">Su Steam, il metodo nativo per tracciare l'attribuzione è tramite i link UTM.</text:span></text:p>
      <text:p text:style-name="P4"/>
      <text:p text:style-name="Standard"><text:span text:style-name="T2">2-Growth</text:span></text:p>
      <text:p text:style-name="Standard"><text:span text:style-name="T3">2.1-Find your first working channel</text:span></text:p>
      <text:p text:style-name="P27"/>
      <text:p text:style-name="P26"><text:span text:style-name="T4">Channel=un mezzo che può essere utilizzato per comunicare con un utente e per distribuire il prodotto.</text:span></text:p>
      <text:p text:style-name="P7"/>
      <text:p text:style-name="P7"/>
      <text:p text:style-name="Standard"><text:span text:style-name="T13">Evaluating Channels</text:span></text:p>
      <text:p text:style-name="Standard"><text:span text:style-name="T4">I 4 criteri principali per scegliere un canale sono:</text:span></text:p>
      <text:list xml:id="list2484680186" text:style-name="WWNum1">
        <text:list-item>
          <text:p text:style-name="P14"><text:span text:style-name="T4">Compatibilità tra gioco e canale</text:span></text:p>
        </text:list-item>
      </text:list>
      <text:p text:style-name="P28"><text:span text:style-name="T4">se le caratteristiche del tuo gioco consentono di raggiunge facilmente un vasto pubblico attraverso un determinato canale</text:span></text:p>
      <text:list xml:id="list838261085" text:style-name="WWNum3">
        <text:list-item>
          <text:p text:style-name="P15"><text:span text:style-name="T4">Compatibilità tra gioco e canale</text:span></text:p>
        </text:list-item>
      </text:list>
      <text:p text:style-name="P28"><text:span text:style-name="T4">se i tuoi giocatori target sono facilmente raggiungibili attraverso questo canale</text:span></text:p>
      <text:list xml:id="list1655772836" text:style-name="WWNum7">
        <text:list-item>
          <text:p text:style-name="P16"><text:span text:style-name="T4">Scalabilità</text:span></text:p>
        </text:list-item>
      </text:list>
      <text:p text:style-name="P28"><text:span text:style-name="T4">canali preferenziali che ti permettono di raggiungere molti giocatori con lo stesso sforzo necessario per contattarne uno solo.</text:span></text:p>
      <text:list xml:id="list1300087174" text:style-name="WWNum9">
        <text:list-item>
          <text:p text:style-name="P17"><text:soft-page-break/><text:span text:style-name="T4">Efficienza</text:span></text:p>
        </text:list-item>
      </text:list>
      <text:p text:style-name="P28"><text:span text:style-name="T4">nella maggior parte dei casi,si desidera il costo per giocatore più basso possibile</text:span></text:p>
      <text:p text:style-name="P29"/>
      <text:p text:style-name="Standard"><text:span text:style-name="T3">2.2-Test your message</text:span></text:p>
      <text:p text:style-name="Standard"><text:span text:style-name="T4">Il messaggio è la proposta di valore fondamentale del gioco per il tuo giocatore target in una rapida panoramica.</text:span></text:p>
      <text:p text:style-name="P10"/>
      <text:p text:style-name="P9"><text:span text:style-name="T4">I messaggi possono essere incapsulati in varie forme ma una cosa che accomuna i giocatori è l'estetica.</text:span></text:p>
      <text:list xml:id="list3490980053" text:style-name="WWNum2">
        <text:list-item>
          <text:p text:style-name="P18"><text:span text:style-name="T4">Hook-Una o due frasi che usi per incapsulare il gioco</text:span></text:p>
        </text:list-item>
        <text:list-item>
          <text:p text:style-name="P18"><text:span text:style-name="T4">Creative-Le foto o i video che le accompagnano</text:span></text:p>
        </text:list-item>
      </text:list>
      <text:p text:style-name="P8"/>
      <text:p text:style-name="Standard"><text:span text:style-name="T15">Funnels</text:span></text:p>
      <text:p text:style-name="Standard"><text:span text:style-name="T4">Channel Funnel=il percorso misurabile e dettagliato di azioni che un utente compie all’interno di uno specifico canale per avvicinarsi all’acquisto del tuo gioco.</text:span></text:p>
      <text:p text:style-name="P4"/>
      <text:p text:style-name="Standard"><text:span text:style-name="T15">Key insight:70/20/10 Rule</text:span></text:p>
      <text:p text:style-name="P29"/>
      <text:list xml:id="list2607533316" text:style-name="WWNum10">
        <text:list-item>
          <text:p text:style-name="P30"><text:span text:style-name="T4">70% del budget di marketing dovrebbe concentrarsi su ciò che già funziona meglio.</text:span></text:p>
        </text:list-item>
        <text:list-item>
          <text:p text:style-name="P30"><text:span text:style-name="T4">20% dovrebbe essere speso per ampliare nuove angolazioni/aree correlate</text:span></text:p>
        </text:list-item>
        <text:list-item>
          <text:p text:style-name="P30"><text:span text:style-name="T4">10% dovrebbe essere dedicato a scommesse sperimentali audaci</text:span></text:p>
        </text:list-item>
      </text:list>
      <text:p text:style-name="P4"/>
      <text:p text:style-name="P3"/>
      <text:p text:style-name="P3"/>
      <text:p text:style-name="P3"><text:soft-page-break/></text:p>
      <text:p text:style-name="P3"/>
      <text:p text:style-name="P3"/>
      <text:p text:style-name="P3"/>
      <text:p text:style-name="Standard"><text:span text:style-name="T3">2.3-Launch your Demo</text:span></text:p>
      <text:p text:style-name="Standard"><text:span text:style-name="T4">Demo= una piccola parte giocabile del tuo gioco che i giocatori possono provare prima del lancio del gioco.</text:span></text:p>
      <text:list xml:id="list637371139" text:style-name="WWNum6">
        <text:list-item>
          <text:p text:style-name="P19"><text:span text:style-name="T4">Quality</text:span></text:p>
        </text:list-item>
      </text:list>
      <text:p text:style-name="P28"><text:span text:style-name="T4">Lanciando una demo con bug o incompleta può portare a più male che bene</text:span></text:p>
      <text:p text:style-name="P29"/>
      <text:list xml:id="list837470890" text:style-name="WWNum12">
        <text:list-item>
          <text:p text:style-name="P20"><text:span text:style-name="T4">Earliness</text:span></text:p>
        </text:list-item>
      </text:list>
      <text:p text:style-name="P28"><text:span text:style-name="T4">Prima la tua demo sarà online,maggiore sarà la visibilità che otterrai da streamer e festival</text:span></text:p>
      <text:p text:style-name="P28"><text:span text:style-name="T4">Questo è particolarmente adatto se il tuo gioco non si adatta bene ad altri canali</text:span></text:p>
      <text:p text:style-name="P9"><text:span text:style-name="T6">Staggered Reaches Outs</text:span></text:p>
      <text:p text:style-name="P9"><text:span text:style-name="T4">La Staggered Reach Out è una strategia che consiste nel mandare la tua demo a solo un porzione di canali che vuoi mettere in evidenza,aggiornare la demo per feedback</text:span></text:p>
      <text:p text:style-name="P9"><text:span text:style-name="T4">Passaggi principali:</text:span></text:p>
      <text:list xml:id="list353810744" text:style-name="WWNum4">
        <text:list-item>
          <text:p text:style-name="P21"><text:span text:style-name="T4">Crea una lista di tutte le terze parti con cui potresti voler collaborare per promuovere il tuo gioco.</text:span></text:p>
        </text:list-item>
        <text:list-item>
          <text:p text:style-name="P21"><text:span text:style-name="T4">Etichetta ciascuna con tre diversi criteri:Reach,Fit,Competitivness</text:span></text:p>
        </text:list-item>
        <text:list-item>
          <text:p text:style-name="P21"><text:span text:style-name="T4">Segmenta la tua lista in 3 livelli</text:span></text:p>
        </text:list-item>
        <text:list-item>
          <text:p text:style-name="P21"><text:span text:style-name="T4">Procedi in gruppi misti</text:span></text:p>
        </text:list-item>
        <text:list-item>
          <text:p text:style-name="P21"><text:span text:style-name="T4">Aggiorna per il feedback</text:span></text:p>
        </text:list-item>
        <text:list-item>
          <text:p text:style-name="P21"><text:span text:style-name="T4">Scambia</text:span></text:p>
        </text:list-item>
        <text:list-item>
          <text:p text:style-name="P21"><text:soft-page-break/><text:span text:style-name="T4">Ripeti</text:span></text:p>
        </text:list-item>
      </text:list>
      <text:p text:style-name="P4"/>
      <text:p text:style-name="Standard"><text:span text:style-name="T2">3-Launch</text:span></text:p>
      <text:p text:style-name="Standard"><text:span text:style-name="T3">3.1-Steam Next Fest</text:span></text:p>
      <text:p text:style-name="Standard"><text:span text:style-name="T9">Steam Next Fest </text:span><text:span text:style-name="T4">è un evento di steam dove i giocatori possono cercare e mettere nella wishlist giochi non ancora rilasciati e guardare le live stream della produzione.</text:span></text:p>
      <text:p text:style-name="P4"/>
      <text:p text:style-name="Standard"><text:span text:style-name="T4">The key take away è che steam Next Fest è un moltiplicatore del tuo attuale slancio nella lista dei desideri,non un sostituto</text:span></text:p>
      <text:p text:style-name="P4"/>
      <text:p text:style-name="Standard"><text:span text:style-name="T14">Come si “Vince” SNF</text:span></text:p>
      <text:p text:style-name="Standard"><text:span text:style-name="T4">L’obiettivo principale è quello di moltiplicare le wishlist esistenti</text:span></text:p>
      <text:p text:style-name="Standard"><text:span text:style-name="T4">ci sono alcuni modi per farlo su steam:</text:span></text:p>
      <text:p text:style-name="Standard"><text:span text:style-name="T4">1.Festival Trailer</text:span></text:p>
      <text:p text:style-name="Standard"><text:span text:style-name="T4">2.Press Review</text:span></text:p>
      <text:p text:style-name="Standard"><text:span text:style-name="T4">3.Organic Discovery</text:span></text:p>
      <text:p text:style-name="Standard"><text:span text:style-name="T4">4. Top Demos</text:span></text:p>
      <text:p text:style-name="P3"/>
      <text:p text:style-name="P3"/>
      <text:p text:style-name="P3"/>
      <text:p text:style-name="P3"/>
      <text:p text:style-name="P3"/>
      <text:p text:style-name="Standard"><text:span text:style-name="T3">3.1-Steam Next Fest</text:span></text:p>
      <text:p text:style-name="Standard"><text:soft-page-break/><text:span text:style-name="T4">Quando stabilisci il prezzo di un gioco,l’obiettivo non è quello di applicare il prezzo più alto possibile.Piuttosto,se si vuole massimizzare il profitto totale generato dal gioco nel corso della sua vita.</text:span></text:p>
      <text:p text:style-name="P4"/>
      <text:p text:style-name="Standard"><text:span text:style-name="T4">Elasticità del prezzo</text:span></text:p>
      <text:p text:style-name="Standard"><text:span text:style-name="T4">Grazie all’enorme offerta,i giochi di steam sono relativamente elastici rispetto al prezzo.</text:span></text:p>
      <text:p text:style-name="Standard"><text:span text:style-name="T4">questo significa che anche piccole variazioni di prezzo possono aver un impatto significativo sul tasso di conversione di copie vendute</text:span></text:p>
      <text:p text:style-name="Standard"><text:span text:style-name="T4">Quando il prezzo di gioco:</text:span></text:p>
      <text:p text:style-name="Standard"><text:span text:style-name="T4">-Aumenta,guadagni di più per ogni vendita,ma meno giocatori sono disposti ad acquistarlo.</text:span></text:p>
      <text:p text:style-name="Standard"><text:span text:style-name="T4">-Diminuisce,guadagni di meno per ogni vendita ma più giocatori sono disposti ad acquistarlo.</text:span></text:p>
      <text:p text:style-name="P3"/>
      <text:p text:style-name="P3"/>
      <text:p text:style-name="Standard"><text:span text:style-name="T3">3.2-Optimise Conversion</text:span></text:p>
      <text:p text:style-name="Standard"><text:span text:style-name="T4">Il giorno del lancio,Seam manderà una mail a tutte le persone che hanno messo il tuo gioco nella wishlist</text:span></text:p>
      <text:p text:style-name="P4"/>
      <text:p text:style-name="Standard"><text:span text:style-name="T9">Strategie per migliorare la performance degli asset</text:span></text:p>
      <text:p text:style-name="Standard"><text:span text:style-name="T4">I diversi elementi della tua pagina steam hanno diversi livelli di influenza.In linea di principio,questo significa che l’ordine di importanza è il seguente:</text:span></text:p>
      <text:p text:style-name="Standard"><text:span text:style-name="T4">1-pagina di pre-landing</text:span></text:p>
      <text:p text:style-name="Standard"><text:span text:style-name="T4">2-contenuti “Above the fold”</text:span></text:p>
      <text:p text:style-name="Standard"><text:span text:style-name="T4">3-Contenuti “Below the fold”</text:span></text:p>
      <text:p text:style-name="P4"/>
      <text:p text:style-name="Standard"><text:span text:style-name="T8">Pre-Landing Page</text:span></text:p>
      <text:p text:style-name="Standard"><text:span text:style-name="T4">Questo è quello che i giocatori vedono quando Steam rende il tuo gioco visibile su un'altra superficie.</text:span></text:p>
      <text:p text:style-name="P4"><text:soft-page-break/></text:p>
      <text:p text:style-name="Standard"><text:span text:style-name="T8">Above the fold</text:span></text:p>
      <text:p text:style-name="Standard"><text:span text:style-name="T4">Gli elementi “Above the fold” includono tutto ciò che è immediatamente visibile a un giocatore senza dover scorrere la pagina.</text:span></text:p>
      <text:p text:style-name="P4"/>
      <text:p text:style-name="Standard"><text:span text:style-name="T8">Below the fold</text:span></text:p>
      <text:p text:style-name="Standard"><text:span text:style-name="T4">Gli elementi “below the fold” includono tutto quello che un player può vedere solo se scorre verso il basso.</text:span></text:p>
      <text:p text:style-name="P4"/>
      <text:p text:style-name="P4"/>
      <text:p text:style-name="P4"/>
      <text:p text:style-name="P6"/>
      <text:p text:style-name="P3"/>
      <text:p text:style-name="Standard"><text:span text:style-name="T3">3.3-Launch Day</text:span></text:p>
      <text:p text:style-name="Standard"><text:span text:style-name="T4">Il giorno del lancio è interessante:</text:span></text:p>
      <text:p text:style-name="P4"/>
      <text:p text:style-name="Standard"><text:span text:style-name="T4">-Da un lato,a causa dell’algoritmo di steam basato sul momentum,le vendite del gioco nel corso della sua vita sono correlate alle vendite nelle prime 48 ore dal lancio.</text:span></text:p>
      <text:p text:style-name="P4"/>
      <text:p text:style-name="Standard"><text:span text:style-name="T4">-Dall’altro lato,il fattore più importante che determina le vendite del primo giorno <text:s/>non è ciò che fai il primo giorno,bensì “Il numero di utenti che hanno aggiunto il gioco nella wishlist”</text:span></text:p>
      <text:p text:style-name="P4"/>
      <text:p text:style-name="Standard"><text:span text:style-name="T5">Il successo del tuo gioco si basa sul lavoro che svolgi nei mesi precedenti al lancio</text:span></text:p>
      <text:p text:style-name="P5"/>
      <text:p text:style-name="Standard"><text:span text:style-name="T9">Le strategie più importanti:</text:span></text:p>
      <text:list xml:id="list928840833" text:style-name="WWNum5">
        <text:list-item>
          <text:p text:style-name="P22"><text:soft-page-break/><text:span text:style-name="T4">Lanciare un nuovo Trailer</text:span></text:p>
        </text:list-item>
        <text:list-item>
          <text:p text:style-name="P22"><text:span text:style-name="T4">Utilizza la scarsità</text:span></text:p>
        </text:list-item>
        <text:list-item>
          <text:p text:style-name="P22"><text:span text:style-name="T4">Aumenta la top dei funnel</text:span></text:p>
        </text:list-item>
        <text:list-item>
          <text:p text:style-name="P22"><text:span text:style-name="T4">Fondo esterno del funnel</text:span></text:p>
        </text:list-item>
        <text:list-item>
          <text:p text:style-name="P22"><text:span text:style-name="T4">Ricevi reviews</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mfortaa" svg:font-family="Comfortaa" style:font-family-generic="roman" style:font-pitch="variable"/>
    <style:font-face style:name="Comfortaa SemiBold" svg:font-family="'Comfortaa SemiBold'" style:font-family-generic="roman" style:font-pitch="variable"/>
    <style:font-face style:name="Impact" svg:font-family="Impac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mfortaa1" svg:font-family="Comfortaa" style:font-family-generic="system" style:font-pitch="variable"/>
    <style:font-face style:name="Comfortaa SemiBold1" svg:font-family="'Comfortaa SemiBold'" style:font-family-generic="system" style:font-pitch="variable"/>
    <style:font-face style:name="Impact1" svg:font-family="Impact"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it"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it"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font-weight-complex="normal"/>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font-style-complex="italic"/>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font-style-complex="normal"/>
    </style:style>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12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2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font-size="12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font-size="12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color="#1155cc" fo:font-size="12pt" style:text-underline-style="solid" style:text-underline-width="auto" style:text-underline-color="font-color"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2" meta:paragraph-count="152" meta:word-count="1339" meta:character-count="8306" meta:non-whitespace-character-count="7133"/>
    <meta:generator>LibreOfficeDev/6.0.5.2$Linux_X86_64 LibreOffice_project/</meta:generator>
  </office:meta>
</office:document-meta>
</file>