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Comfortaa" svg:font-family="Comfortaa" style:font-family-generic="roman" style:font-pitch="variable"/>
    <style:font-face style:name="Impact" svg:font-family="Impact"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omfortaa1" svg:font-family="Comfortaa"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color="#ff0000" style:font-name="Impact" fo:font-size="15pt" style:font-name-asian="Impact1" style:font-size-asian="15pt" style:font-name-complex="Impact1" style:font-size-complex="15pt" fo:background-color="#ffff00"/>
    </style:style>
    <style:style style:name="P3" style:family="paragraph" style:parent-style-name="Standard">
      <style:text-properties fo:color="#ff0000" style:font-name="Comfortaa" fo:font-size="13pt" style:font-name-asian="Comfortaa1" style:font-size-asian="13pt" style:font-name-complex="Comfortaa1" style:font-size-complex="13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font-size="12pt" style:font-size-asian="12pt" style:font-size-complex="12pt"/>
    </style:style>
    <style:style style:name="P6" style:family="paragraph" style:parent-style-name="Standard">
      <style:paragraph-properties fo:margin-left="0in" fo:margin-right="0in" fo:text-indent="0in" style:auto-text-indent="false"/>
      <style:text-properties fo:color="#ff0000" style:font-name="Comfortaa" fo:font-size="13pt" style:font-name-asian="Comfortaa1" style:font-size-asian="13pt" style:font-name-complex="Comfortaa1" style:font-size-complex="13pt"/>
    </style:style>
    <style:style style:name="P7" style:family="paragraph" style:parent-style-name="Standard">
      <style:paragraph-properties fo:margin-left="0in" fo:margin-right="0in" fo:text-indent="0.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2" style:family="paragraph" style:parent-style-name="Standard">
      <style:paragraph-properties fo:margin-top="0in" fo:margin-bottom="0in" loext:contextual-spacing="false" fo:line-height="128%"/>
    </style:style>
    <style:style style:name="P13" style:family="paragraph" style:parent-style-name="Standard" style:master-page-name="Standard">
      <style:paragraph-properties style:page-number="1"/>
    </style:style>
    <style:style style:name="T1" style:family="text">
      <style:text-properties fo:font-size="12pt" style:font-size-asian="12pt" style:font-size-complex="12pt"/>
    </style:style>
    <style:style style:name="T2" style:family="text">
      <style:text-properties fo:font-size="12pt" style:font-size-asian="12pt" style:font-size-complex="12pt" fo:background-color="#ffff00"/>
    </style:style>
    <style:style style:name="T3" style:family="text">
      <style:text-properties fo:font-size="12pt" style:text-underline-style="none" style:font-size-asian="12pt" style:font-size-complex="12pt"/>
    </style:style>
    <style:style style:name="T4" style:family="text">
      <style:text-properties fo:font-size="12pt" fo:background-color="#ff9900" loext:char-shading-value="0" style:font-size-asian="12pt" style:font-size-complex="12pt"/>
    </style:style>
    <style:style style:name="T5" style:family="text">
      <style:text-properties fo:color="#ff0000" style:font-name="Impact" fo:font-size="17pt" style:font-name-asian="Impact1" style:font-size-asian="17pt" style:font-name-complex="Impact1" style:font-size-complex="17pt"/>
    </style:style>
    <style:style style:name="T6" style:family="text">
      <style:text-properties fo:color="#ff0000" style:font-name="Comfortaa" fo:font-size="13pt" style:font-name-asian="Comfortaa1" style:font-size-asian="13pt" style:font-name-complex="Comfortaa1" style:font-size-complex="13pt"/>
    </style:style>
    <style:style style:name="T7" style:family="text">
      <style:text-properties fo:color="#ff9900" fo:font-size="12pt" style:font-size-asian="12pt" style:font-size-complex="12pt"/>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ame marketing è la disciplina di comunicazione e di consegna del tuo gioco ai giocatori</text:span></text:p>
      <text:p text:style-name="P1"/>
      <text:p text:style-name="Standard"><text:span text:style-name="T1">Nel 2026 se non si ha un publisher come epic games la cosa più probabile è quella di lanciare il tuo gioco su steam.</text:span></text:p>
      <text:p text:style-name="P1"/>
      <text:p text:style-name="Standard"><text:span text:style-name="T1">“Valve accounts?” detiene circa il 75% delle vendite totali di videogiochi per pc e all’inizio di questo anno ha raggiunto oltre 42 milioni di utenti simultanei.</text:span></text:p>
      <text:p text:style-name="P1"/>
      <text:p text:style-name="Standard"><text:span text:style-name="T1">Questo vuol dire che steam è il tuo primo canale di pubblicazione,se non ottimizzi Steam verrai lasciato indietro poiché steam è un winner-takes-all system,</text:span></text:p>
      <text:p text:style-name="P1"/>
      <text:p text:style-name="Standard"><text:span text:style-name="T1">Il percorso per pubblicizzare il tuo gioco su steam è suddiviso in 3 obiettivi:</text:span></text:p>
      <text:p text:style-name="P1"/>
      <text:p text:style-name="Standard"><text:span text:style-name="T1">1.Foundation</text:span></text:p>
      <text:p text:style-name="Standard"><text:span text:style-name="T1">2.Growth</text:span></text:p>
      <text:p text:style-name="Standard"><text:span text:style-name="T1">3.Launch</text:span></text:p>
      <text:p text:style-name="P1"/>
      <text:p text:style-name="Standard"><text:span text:style-name="T5">Foundation</text:span></text:p>
      <text:p text:style-name="P2"/>
      <text:p text:style-name="Standard"><text:span text:style-name="T2">Il marketing è un modo per aumentare il successo del tuo gioco,non un rimpiazzo.</text:span></text:p>
      <text:p text:style-name="Standard"><text:span text:style-name="T2">Questo vuol dire che c’è bisogno di costruire qualcosa che i giocatori vogliano.</text:span></text:p>
      <text:p text:style-name="P1"/>
      <text:p text:style-name="Standard">Tieni a mente due cose:</text:p>
      <text:p text:style-name="Standard"><text:soft-page-break/>1.scegli un obiettivo con abbastanza richiesta</text:p>
      <text:p text:style-name="Standard">2.fai un gioco divertente</text:p>
      <text:p text:style-name="Standard"/>
      <text:p text:style-name="Standard"><text:span text:style-name="T6">1-Target market demand</text:span></text:p>
      <text:p text:style-name="P3"/>
      <text:p text:style-name="Standard"><text:span text:style-name="T7">1-Total addressable market</text:span></text:p>
      <text:p text:style-name="Standard"><text:span text:style-name="T1"><text:tab/></text:span></text:p>
      <text:p text:style-name="Standard"><text:span text:style-name="T1">a.TAM sono il numero maggiore di copie che il tuo gioco può vendere</text:span></text:p>
      <text:p text:style-name="Standard"><text:span text:style-name="T1"><text:tab/></text:span></text:p>
      <text:p text:style-name="Standard"><text:span text:style-name="T1">b.Per stimarlo vai su </text:span><text:a xlink:type="simple" xlink:href="https://games-stats.com/steam/tags/" text:style-name="ListLabel_20_19" text:visited-style-name="ListLabel_20_19"><text:span text:style-name="T8">Game Stats</text:span></text:a><text:span text:style-name="T1"> e trova i guadagni stimati per ogni genere.</text:span></text:p>
      <text:p text:style-name="P4"><text:span text:style-name="T1"><text:tab/></text:span></text:p>
      <text:p text:style-name="P4"><text:span text:style-name="T1">c.Anche se fai un gioco fantastico,se il tuo genere l’anno prima ha fatto solo 5 <text:s text:c="4"/>vendite probabilmente non ci sono abbastanza vendite.</text:span></text:p>
      <text:p text:style-name="P7"><text:span text:style-name="T1"><text:tab/></text:span></text:p>
      <text:p text:style-name="P5"/>
      <text:p text:style-name="P5"/>
      <text:p text:style-name="P5"/>
      <text:p text:style-name="P5"/>
      <text:p text:style-name="P5"/>
      <text:p text:style-name="P4"><text:span text:style-name="T7">2-Competition intensity</text:span></text:p>
      <text:p text:style-name="P5"/>
      <text:p text:style-name="P4"><text:span text:style-name="T1">a.usando la stessa pagina,guarda al conteggio dei giochi per capire quanti altri c’è ne sono</text:span></text:p>
      <text:p text:style-name="P4"><text:soft-page-break/><text:span text:style-name="T1">poi guarda a:</text:span></text:p>
      <text:p text:style-name="P4"><text:span text:style-name="T1">i.Ricavo mediano</text:span></text:p>
      <text:p text:style-name="P4"><text:span text:style-name="T1">ii.Ricavo medio</text:span></text:p>
      <text:p text:style-name="P4"><text:span text:style-name="T1">iii.Ricavo percentuale</text:span></text:p>
      <text:p text:style-name="P5"/>
      <text:p text:style-name="P4"><text:span text:style-name="T7">3-Comp title performance</text:span></text:p>
      <text:p text:style-name="P4"><text:span text:style-name="T1">a.vai su </text:span><text:a xlink:type="simple" xlink:href="https://steamdb.info/charts/" text:style-name="ListLabel_20_19" text:visited-style-name="ListLabel_20_19"><text:span text:style-name="T8">Steam DB</text:span></text:a><text:span text:style-name="T1"> e cerca i 5-10 giochi che hanno i titoli più competitivi:</text:span></text:p>
      <text:p text:style-name="P4"><text:span text:style-name="T1">i. se il gioco è già stato lanciato guarda ai giocatori stimati.</text:span></text:p>
      <text:p text:style-name="P5"/>
      <text:p text:style-name="P4"><text:span text:style-name="T1">ii. se il gioco è in pre lancio,guarda al totale dei seguiti</text:span></text:p>
      <text:p text:style-name="P5"/>
      <text:p text:style-name="P4"><text:span text:style-name="T6">Game design</text:span></text:p>
      <text:p text:style-name="P6"/>
      <text:p text:style-name="P4"><text:span text:style-name="T1">Dopo che hai scelto il genere devi decidere sui loop e novità del tuo gioco.</text:span></text:p>
      <text:p text:style-name="P5"/>
      <text:p text:style-name="P4"><text:span text:style-name="T1">Target player=il tipo di persona a cui piace e pagherebbe per il tuo gioco.</text:span></text:p>
      <text:p text:style-name="P5"/>
      <text:p text:style-name="P4"><text:span text:style-name="T1">Assumiamo che il tuo target player condivide gli stessi tratti di persone a cui sono piaciuti i tuoi giochi:</text:span></text:p>
      <text:list xml:id="list3976640275" text:style-name="WWNum1">
        <text:list-item>
          <text:p text:style-name="P8"><text:span text:style-name="T1">Genere</text:span></text:p>
        </text:list-item>
        <text:list-item>
          <text:p text:style-name="P8"><text:span text:style-name="T1">Titoli competitivi</text:span></text:p>
        </text:list-item>
      </text:list>
      <text:p text:style-name="P5"/>
      <text:p text:style-name="P4"><text:soft-page-break/><text:span text:style-name="T1">Game design è un argomento a parte,però un approccio semplice è quello di guardare a giochi di successo o ad alcune caratteristiche:</text:span></text:p>
      <text:list xml:id="list2986216329" text:style-name="WWNum2">
        <text:list-item>
          <text:p text:style-name="P9"><text:span text:style-name="T1">Aesthetics</text:span></text:p>
        </text:list-item>
        <text:list-item>
          <text:p text:style-name="P10"><text:span text:style-name="T1">High level concept</text:span></text:p>
        </text:list-item>
        <text:list-item>
          <text:p text:style-name="P10"><text:span text:style-name="T1">Co-op experiences</text:span></text:p>
        </text:list-item>
        <text:list-item>
          <text:p text:style-name="P10"><text:span text:style-name="T1">Depth of content</text:span></text:p>
        </text:list-item>
        <text:list-item>
          <text:p text:style-name="P11"><text:span text:style-name="T1">Specific genre-related emotions</text:span></text:p>
        </text:list-item>
      </text:list>
      <text:p text:style-name="P5"/>
      <text:p text:style-name="P3"/>
      <text:p text:style-name="P3"/>
      <text:p text:style-name="P3"/>
      <text:p text:style-name="P3"/>
      <text:p text:style-name="P3"/>
      <text:p text:style-name="P3"/>
      <text:p text:style-name="P3"/>
      <text:p text:style-name="P3"/>
      <text:p text:style-name="Standard"><text:span text:style-name="T6">1.2-Coming soon page</text:span></text:p>
      <text:p text:style-name="Standard"><text:span text:style-name="T1">Appena tu hai le basi del tuo gioco,e il tuo genere,il mio consiglio è quello di lanciare la Coming soon page.</text:span></text:p>
      <text:p text:style-name="P1"/>
      <text:p text:style-name="Standard"><text:span text:style-name="T4">Caratteristiche minime</text:span></text:p>
      <text:p text:style-name="Standard"><text:span text:style-name="T4">L’elemento minimo necessario per lanciare questa pagina “Prossimamente” su steam.</text:span></text:p>
      <text:p text:style-name="Standard"><text:span text:style-name="T4">Questo include:</text:span></text:p>
      <text:p text:style-name="P1"><text:soft-page-break/></text:p>
      <text:p text:style-name="Standard"><text:span text:style-name="T4">1.Game Title</text:span></text:p>
      <text:p text:style-name="Standard"><text:span text:style-name="T4">2.Genres Tag</text:span></text:p>
      <text:p text:style-name="Standard"><text:span text:style-name="T4">3.Capsule art</text:span></text:p>
      <text:p text:style-name="Standard"><text:span text:style-name="T4">4.Trailer</text:span></text:p>
      <text:p text:style-name="Standard"><text:span text:style-name="T4">5.Screenshots</text:span></text:p>
      <text:p text:style-name="Standard"><text:span text:style-name="T4">6.Description</text:span></text:p>
      <text:p text:style-name="P1"/>
      <text:p text:style-name="Standard"><text:span text:style-name="T2">a.Somiglianza </text:span></text:p>
      <text:p text:style-name="Standard"><text:span text:style-name="T1">Comunicare il tuo tipo di gioco è quello che piace alla tua target audience </text:span></text:p>
      <text:p text:style-name="P1"/>
      <text:p text:style-name="Standard"><text:span text:style-name="T2">b.Differenza</text:span></text:p>
      <text:p text:style-name="Standard"><text:span text:style-name="T1">Comunicare che è abbastanza unico dai giochi che hanno giocato in precedenza</text:span></text:p>
      <text:p text:style-name="P1"/>
      <text:p text:style-name="Standard"><text:span text:style-name="T2">c.Qualità</text:span></text:p>
      <text:p text:style-name="Standard"><text:span text:style-name="T1">Qualunque siano le caratteristiche che hai identificato come importanti per il tuo pubblico di riferimento,i contenuti devono comunicare un senso di alta qualità.</text:span></text:p>
      <text:p text:style-name="P1"/>
      <text:p text:style-name="P1"/>
      <text:p text:style-name="Standard"><text:span text:style-name="T6">1.3-Set up tracking</text:span></text:p>
      <text:p text:style-name="Standard"><text:span text:style-name="T9">Attribution for steam </text:span></text:p>
      <text:p text:style-name="Standard"><text:span text:style-name="T1">Attributi:È il metodo utilizzato dagli inserzionisti per determinare quali attività di marketing (ad esempio, annunci, campagne di streaming, demo) sono responsabili di quali azioni degli utenti (ad esempio, coinvolgimento, liste dei desideri, acquisti).</text:span></text:p>
      <text:p text:style-name="P1"><text:soft-page-break/></text:p>
      <text:p text:style-name="Standard"><text:span text:style-name="T1">In parole semplici, risponde alla domanda: quali canali stanno creando una domanda reale e quali stanno solo generando rumore?</text:span></text:p>
      <text:p text:style-name="P1"/>
      <text:p text:style-name="P12"><text:span text:style-name="T1">Su Steam, il metodo nativo per tracciare l'attribuzione è tramite i link UTM.</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67" meta:word-count="536" meta:character-count="3321" meta:non-whitespace-character-count="2844"/>
    <meta:generator>LibreOfficeDev/6.0.5.2$Linux_X86_64 LibreOffice_project/</meta:generator>
  </office:meta>
</office:document-meta>
</file>